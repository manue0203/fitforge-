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0303" officeooo:paragraph-rsid="000a0303"/>
    </style:style>
    <style:style style:name="P2" style:family="paragraph" style:parent-style-name="Standard">
      <style:paragraph-properties fo:text-align="center" style:justify-single-word="false"/>
      <style:text-properties officeooo:rsid="000650e4" officeooo:paragraph-rsid="000650e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a20f" officeooo:paragraph-rsid="0007a20f" style:font-weight-asian="bold" style:font-weight-complex="bold"/>
    </style:style>
    <style:style style:name="P4" style:family="paragraph" style:parent-style-name="Standard">
      <style:text-properties fo:color="#472702" loext:opacity="100%" style:text-underline-style="solid" style:text-underline-width="auto" style:text-underline-color="font-color" fo:font-weight="bold" officeooo:rsid="000650e4" officeooo:paragraph-rsid="000650e4" style:font-weight-asian="bold" style:font-weight-complex="bold"/>
    </style:style>
    <style:style style:name="P5" style:family="paragraph" style:parent-style-name="Standard">
      <style:text-properties fo:color="#472702" loext:opacity="100%" fo:font-weight="bold" officeooo:rsid="000650e4" officeooo:paragraph-rsid="000650e4" style:font-weight-asian="bold" style:font-weight-complex="bold"/>
    </style:style>
    <style:style style:name="P6" style:family="paragraph" style:parent-style-name="Text_20_body">
      <style:text-properties officeooo:rsid="000650e4" officeooo:paragraph-rsid="000650e4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rsid="000650e4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650e4"/>
    </style:style>
    <style:style style:name="P9" style:family="paragraph" style:parent-style-name="Standard">
      <style:text-properties officeooo:rsid="000650e4" officeooo:paragraph-rsid="000650e4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  <style:text-properties officeooo:rsid="000650e4"/>
    </style:style>
    <style:style style:name="P11" style:family="paragraph" style:parent-style-name="Standard">
      <style:text-properties officeooo:rsid="0007a20f" officeooo:paragraph-rsid="0007a20f"/>
    </style:style>
    <style:style style:name="P12" style:family="paragraph" style:parent-style-name="Standard">
      <style:text-properties officeooo:paragraph-rsid="000650e4"/>
    </style:style>
    <style:style style:name="P13" style:family="paragraph" style:parent-style-name="Text_20_body" style:list-style-name="L3">
      <style:paragraph-properties fo:margin-left="0cm" fo:margin-right="0cm" fo:text-indent="0cm" style:auto-text-indent="false"/>
      <style:text-properties officeooo:rsid="000650e4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  <style:text-properties officeooo:rsid="000650e4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  <style:text-properties officeooo:rsid="000650e4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officeooo:rsid="000650e4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  <style:text-properties officeooo:rsid="000650e4"/>
    </style:style>
    <style:style style:name="P18" style:family="paragraph" style:parent-style-name="Text_20_body" style:list-style-name="L8">
      <style:paragraph-properties fo:margin-left="0cm" fo:margin-right="0cm" fo:text-indent="0cm" style:auto-text-indent="false"/>
      <style:text-properties officeooo:rsid="000650e4"/>
    </style:style>
    <style:style style:name="P19" style:family="paragraph" style:parent-style-name="Standard">
      <style:paragraph-properties fo:text-align="start" style:justify-single-word="false"/>
      <style:text-properties officeooo:rsid="000650e4" officeooo:paragraph-rsid="000650e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7a20f"/>
    </style:style>
    <style:style style:name="T3" style:family="text">
      <style:text-properties officeooo:rsid="000650e4"/>
    </style:style>
    <style:style style:name="T4" style:family="text">
      <style:text-properties officeooo:rsid="000907c2"/>
    </style:style>
    <style:style style:name="T5" style:family="text">
      <style:text-properties officeooo:rsid="000a0303"/>
    </style:style>
    <style:style style:name="T6" style:family="text">
      <style:text-properties fo:color="#472702" loext:opacity="100%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ina SEHOSSOLO</text:p>
      <text:p text:style-name="P1">2BTS</text:p>
      <text:p text:style-name="P2"/>
      <text:p text:style-name="P2"/>
      <text:p text:style-name="P2">Questionnaire d’évaluation</text:p>
      <text:p text:style-name="P2"/>
      <text:p text:style-name="P2">projet FitForge – Application mobile Flutter/Dart </text:p>
      <text:p text:style-name="P2"/>
      <text:p text:style-name="P2"/>
      <text:p text:style-name="P3">Lien du projet : <text:span text:style-name="T1">https://github.com/manue0203/fitforge-</text:span></text:p>
      <text:p text:style-name="P4"/>
      <text:p text:style-name="P4">Principaux objectifs de ce projet :</text:p>
      <text:p text:style-name="P5"/>
      <text:p text:style-name="P6">Les objectifs étaient de créer une application mobile <text:span text:style-name="T2">qui est </text:span>capable de :</text:p>
      <text:list text:style-name="L1">
        <text:list-item>
          <text:p text:style-name="P7">charger des exercices depuis un fichier JSON,</text:p>
        </text:list-item>
        <text:list-item>
          <text:p text:style-name="P7">afficher un catalogue <text:span text:style-name="T2">dont on peut utiliser un filtre</text:span>,</text:p>
        </text:list-item>
        <text:list-item>
          <text:p text:style-name="P7">générer une séance personnalisée selon des critères (groupe, durée, niveau),</text:p>
        </text:list-item>
        <text:list-item>
          <text:p text:style-name="P7">proposer une interface simple, moderne et adaptée au smartphone.</text:p>
        </text:list-item>
      </text:list>
      <text:p text:style-name="P8">L’idée était d’avoir une app<text:span text:style-name="T2">lication</text:span> fonctionnelle, propre et facile à utiliser <text:span text:style-name="T2">pour tout utilisateur</text:span>.</text:p>
      <text:p text:style-name="P9"/>
      <text:p text:style-name="P9"/>
      <text:p text:style-name="P4">Le projet répond t’il aux exigences fonctionnelles et techniques définies</text:p>
      <text:p text:style-name="P9"/>
      <text:p text:style-name="P6">Oui, l’application respecte les exigences principales :</text:p>
      <text:list text:style-name="L2">
        <text:list-item>
          <text:p text:style-name="P10">les données sont bien chargées depuis <text:span text:style-name="T2">le</text:span> fichier JSON <text:span text:style-name="T2">fourni</text:span>,</text:p>
        </text:list-item>
        <text:list-item>
          <text:p text:style-name="P10">le catalogue affiche tous les exercices <text:span text:style-name="T2">présent dans le fichier</text:span>,</text:p>
        </text:list-item>
        <text:list-item>
          <text:p text:style-name="P10">l’<text:span text:style-name="T2">utilisation du filtrage</text:span> fonctionne,</text:p>
        </text:list-item>
        <text:list-item>
          <text:p text:style-name="P10">la génération <text:span text:style-name="T2">de la séance </text:span>fonctionne,</text:p>
        </text:list-item>
        <text:list-item>
          <text:p text:style-name="P10">l’interface est adaptée au mobile.</text:p>
        </text:list-item>
      </text:list>
      <text:p text:style-name="P9"/>
      <text:p text:style-name="P4">Y a t’il des bugs dans le programme actuel : </text:p>
      <text:p text:style-name="P9"/>
      <text:p text:style-name="P9">Il n’y a plus de bugs. Les principaux problèmes venaient du filtrage <text:span text:style-name="T2">lors du chargement du fichier</text:span>, mais ils ont <text:span text:style-name="T2">normalement</text:span> été corrigés. Aujourd’hui, l’application fonctionne correctement dans son ensemble. </text:p>
      <text:p text:style-name="P9"/>
      <text:p text:style-name="P4">Votre code est il documenté ?: </text:p>
      <text:p text:style-name="P9"/>
      <text:p text:style-name="P11">Oui, il est documenté de façon suffisante </text:p>
      <text:p text:style-name="P9"/>
      <text:p text:style-name="P4">Avez-vous mis en place une gestion des erreurs ?:</text:p>
      <text:p text:style-name="P9"/>
      <text:p text:style-name="P12"><text:span text:style-name="T3"><text:s/></text:span><text:span text:style-name="T4">Oui, une petite gestion des erreurs comme : </text:span>si aucun exercice ne correspond aux critères, une séance “Aucune séance trouvée” est affichée, </text:p>
      <text:p text:style-name="P9"><text:soft-page-break/></text:p>
      <text:p text:style-name="P4">Quels sont les composants principaux de l’application et pour<text:span text:style-name="T4">quoi</text:span> les avez-vous choisis ?</text:p>
      <text:p text:style-name="P9"/>
      <text:p text:style-name="P6">Les composants principaux <text:span text:style-name="T4">de l’application</text:span> sont :</text:p>
      <text:list text:style-name="L3">
        <text:list-item>
          <text:p text:style-name="P13"><text:span text:style-name="Strong_20_Emphasis">Scaffold / AppBar</text:span> : structure de base d’une page Flutter,</text:p>
        </text:list-item>
        <text:list-item>
          <text:p text:style-name="P13"><text:span text:style-name="Strong_20_Emphasis">DropdownButton</text:span> : idéal pour sélectionner des critères,</text:p>
        </text:list-item>
        <text:list-item>
          <text:p text:style-name="P13"><text:span text:style-name="Strong_20_Emphasis">ListView.builder</text:span> : pour afficher une liste d’exercices <text:span text:style-name="T4">de façon dynamique</text:span>,</text:p>
        </text:list-item>
        <text:list-item>
          <text:p text:style-name="P13"><text:span text:style-name="Strong_20_Emphasis">Future + JSON</text:span> : permet de charger des données externes facilement,</text:p>
        </text:list-item>
        <text:list-item>
          <text:p text:style-name="P13"><text:span text:style-name="Strong_20_Emphasis">Navigation Flutter</text:span> : pour passer d’une page à l’autre.</text:p>
        </text:list-item>
      </text:list>
      <text:p text:style-name="P9"><text:span text:style-name="T5">D’après mes recherches (avec les différents documents), c</text:span>es composants sont simples, efficaces et adaptés à une application mobile. </text:p>
      <text:p text:style-name="P9"/>
      <text:p text:style-name="P4">L’interface est-elle adaptée à une utilisation sur smartphone ?</text:p>
      <text:p text:style-name="P9"/>
      <text:p text:style-name="P6">Oui, l’interface est pensée pour le mobile :</text:p>
      <text:list text:style-name="L4">
        <text:list-item>
          <text:p text:style-name="P14">menus déroulants larges et lisibles,</text:p>
        </text:list-item>
        <text:list-item>
          <text:p text:style-name="P14">boutons arrondis faciles à cliquer,</text:p>
        </text:list-item>
        <text:list-item>
          <text:p text:style-name="P14">couleurs c<text:span text:style-name="T4">lairs,</text:span></text:p>
        </text:list-item>
        <text:list-item>
          <text:p text:style-name="P14">texte centré et lisible.</text:p>
        </text:list-item>
      </text:list>
      <text:p text:style-name="P9"/>
      <text:p text:style-name="P9"/>
      <text:p text:style-name="P4">Défis rencontrés lors de ce projet :</text:p>
      <text:p text:style-name="P9"/>
      <text:p text:style-name="P6">L<text:span text:style-name="T4">ors de ce projet l</text:span>es principaux défis ont été <text:span text:style-name="T4">pour </text:span>:</text:p>
      <text:list text:style-name="L5">
        <text:list-item>
          <text:p text:style-name="P15">charger correctement le fichier JSON,</text:p>
        </text:list-item>
        <text:list-item>
          <text:p text:style-name="P15">styliser l’interface pour qu’elle soit agréable,</text:p>
        </text:list-item>
        <text:list-item>
          <text:p text:style-name="P15">comprendre la logique de Flutter (widgets, états, navigation).</text:p>
        </text:list-item>
      </text:list>
      <text:p text:style-name="P9"/>
      <text:p text:style-name="P9"/>
      <text:p text:style-name="P4">Êtes vous satisfait du niveau de développement de votre application :</text:p>
      <text:p text:style-name="P9"/>
      <text:p text:style-name="P6">Oui, le résultat est <text:span text:style-name="T4">plutôt</text:span> satisfaisant :</text:p>
      <text:list text:style-name="L6">
        <text:list-item>
          <text:p text:style-name="P16">l’application fonctionne,</text:p>
        </text:list-item>
        <text:list-item>
          <text:p text:style-name="P16">les données sont bien intégrées,</text:p>
        </text:list-item>
        <text:list-item>
          <text:p text:style-name="P16">les fonctionnalités principales sont là.</text:p>
        </text:list-item>
      </text:list>
      <text:p text:style-name="P9"/>
      <text:p text:style-name="P9"/>
      <text:p text:style-name="P4">Qu’avez vous appris de ce projet et comment cela influencera t-il vos projets futurs </text:p>
      <text:p text:style-name="P4"/>
      <text:p text:style-name="P6">Ce projet m’a appris :</text:p>
      <text:list text:style-name="L7">
        <text:list-item>
          <text:p text:style-name="P17"><text:soft-page-break/>à manipuler Flutter et ses widgets,</text:p>
        </text:list-item>
        <text:list-item>
          <text:p text:style-name="P17">à charger et exploiter un fichier JSON,</text:p>
        </text:list-item>
        <text:list-item>
          <text:p text:style-name="P17">à structurer une application mobile,</text:p>
        </text:list-item>
        <text:list-item>
          <text:p text:style-name="P17">à gérer des états et des filtres,</text:p>
        </text:list-item>
        <text:list-item>
          <text:p text:style-name="P17">à styliser une interface.</text:p>
        </text:list-item>
      </text:list>
      <text:p text:style-name="P8">Pour mes futurs projets, je serai plus à l’aise avec Flutter, et je saurai mieux organiser mon code et mes données.</text:p>
      <text:p text:style-name="P9"/>
      <text:p text:style-name="P9"/>
      <text:p text:style-name="P4">Y a t-il des aspects que vous auriez fait différemment si vous auriez eu plus de temps ou de ressources :</text:p>
      <text:p text:style-name="P9"/>
      <text:p text:style-name="P6">Oui :</text:p>
      <text:list text:style-name="L8">
        <text:list-item>
          <text:p text:style-name="P18">j’aurais ajouté des images pour chaque exercice,</text:p>
        </text:list-item>
        <text:list-item>
          <text:p text:style-name="P18">j’aurais ajouté un système de favoris,</text:p>
        </text:list-item>
        <text:list-item>
          <text:p text:style-name="P18">j’aurais amélioré la gestion d’erreurs,</text:p>
        </text:list-item>
        <text:list-item>
          <text:p text:style-name="P18">j’aurais ajouté un mode sombre.</text:p>
        </text:list-item>
      </text:list>
      <text:p text:style-name="P9"/>
      <text:p text:style-name="P9"/>
      <text:p text:style-name="P4">Quelle note globale :</text:p>
      <text:p text:style-name="P4"/>
      <text:p text:style-name="P9"><text:span text:style-name="T4">J</text:span>e donnerais au projet une <text:span text:style-name="T5">note globale de 7 parce que je le trouve assez fonctionnel et propre.</text:span></text:p>
      <text:p text:style-name="P9"/>
      <text:p text:style-name="P9"><text:span text:style-name="T6">Quelle note personnelle :</text:span> </text:p>
      <text:p text:style-name="P9"/>
      <text:p text:style-name="P9">Personnellement, je me donnerais <text:span text:style-name="T5">un 6 ou un 7</text:span>, car j’ai réussi à <text:span text:style-name="T5">mieux</text:span> comprendre Flutter, corriger les bugs et obtenir un résultat propre malgré les difficultés. </text:p>
      <text:p text:style-name="P9"/>
      <text:p text:style-name="P4">Suggestion pour améliorer ce type de projet : </text:p>
      <text:p text:style-name="P19"><text:s text:c="5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15:52:31.978819900</meta:creation-date>
    <dc:date>2026-05-11T16:51:18.593070300</dc:date>
    <meta:editing-duration>PT6M21S</meta:editing-duration>
    <meta:editing-cycles>1</meta:editing-cycles>
    <meta:document-statistic meta:table-count="0" meta:image-count="0" meta:object-count="0" meta:page-count="3" meta:paragraph-count="69" meta:word-count="613" meta:character-count="3817" meta:non-whitespace-character-count="3233"/>
    <meta:generator>LibreOffice/25.2.7.1$Windows_X86_64 LibreOffice_project/16e8e36d1610f10597ed778c3dcb0a5aa0ed5d6f</meta:generator>
  </office:meta>
</office:document-meta>
</file>